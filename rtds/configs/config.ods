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16.729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4.574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6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5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/>
    <style:style style:name="ce13" style:family="table-cell" style:parent-style-name="Default" style:data-style-name="N100">
      <style:text-properties style:font-name="Liberation Serif" style:font-name-asian="DejaVu Sans" style:font-name-complex="DejaVu Sans"/>
    </style:style>
    <style:style style:name="ce14" style:family="table-cell" style:parent-style-name="Default">
      <style:text-properties style:font-name="Liberation Serif" style:font-name-asian="DejaVu Sans" style:font-name-complex="DejaVu Sans"/>
    </style:style>
    <style:style style:name="ce9" style:family="table-cell" style:parent-style-name="Default" style:data-style-name="N100">
      <style:text-properties style:font-name="Liberation Sans" style:font-name-asian="Microsoft YaHei" style:font-name-complex="Arial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ext-properties style:font-name="Liberation Sans" style:font-name-asian="Microsoft YaHei" style:font-name-complex="Arial"/>
    </style:style>
    <style:style style:name="ce7" style:family="table-cell" style:parent-style-name="Default" style:data-style-name="N100">
      <style:text-properties style:font-name="Liberation Serif" style:font-name-asian="DejaVu Sans" style:font-name-complex="DejaVu Sans"/>
    </style:style>
    <style:style style:name="ce15" style:family="table-cell" style:parent-style-name="Default">
      <style:text-properties style:font-name="Liberation Serif" style:font-name-asian="DejaVu Sans" style:font-name-complex="DejaVu Sans"/>
    </style:style>
    <style:style style:name="ce10" style:family="table-cell" style:parent-style-name="Default" style:data-style-name="N100">
      <style:table-cell-properties style:vertical-align="top"/>
    </style:style>
    <style:style style:name="ce11" style:family="table-cell" style:parent-style-name="Default">
      <style:table-cell-properties style:vertical-align="top"/>
    </style:style>
    <style:style style:name="ce12" style:family="table-cell" style:parent-style-name="Default" style:data-style-name="N100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onnectors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is_read_only</text:p>
          </table:table-cell>
          <table:table-cell table:style-name="Default" office:value-type="string" calcext:value-type="string">
            <text:p>connection_string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modbus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nector=ModBus; host=emulator; port=5502; unit_id=1; timeout=5; auto_open=true; auto_close=true</text:p>
          </table:table-cell>
          <table:table-cell office:value-type="string" calcext:value-type="string">
            <text:p>Modbus коннектор</text:p>
          </table:table-cell>
        </table:table-row>
        <table:table-row table:style-name="ro1">
          <table:table-cell office:value-type="string" calcext:value-type="string">
            <text:p>modbus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=ModBus; host=emulator; port=5502; unit_id=1; timeout=5; auto_open=true; auto_close=true</text:p>
          </table:table-cell>
          <table:table-cell office:value-type="string" calcext:value-type="string">
            <text:p>Modbus коннектор</text:p>
          </table:table-cell>
        </table:table-row>
        <table:table-row table:style-name="ro1">
          <table:table-cell office:value-type="string" calcext:value-type="string">
            <text:p>modbus_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=ModBus; host=emulator; port=5502; unit_id=1; timeout=5; auto_open=true; auto_close=true</text:p>
          </table:table-cell>
          <table:table-cell office:value-type="string" calcext:value-type="string">
            <text:p>Modbus коннектор</text:p>
          </table:table-cell>
        </table:table-row>
        <table:table-row table:style-name="ro1">
          <table:table-cell office:value-type="string" calcext:value-type="string">
            <text:p>modbus_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onnector=ModBus; host=emulator; port=5502; unit_id=1; timeout=5; auto_open=true; auto_close=true</text:p>
          </table:table-cell>
          <table:table-cell office:value-type="string" calcext:value-type="string">
            <text:p>Modbus коннектор</text:p>
          </table:table-cell>
        </table:table-row>
      </table:table>
      <table:table table:name="Tags" table:style-name="ta1">
        <table:table-column table:style-name="co4" table:default-cell-style-name="ce5"/>
        <table:table-column table:style-name="co1" table:default-cell-style-name="ce5"/>
        <table:table-column table:style-name="co1" table:number-columns-repeated="4" table:default-cell-style-name="Default"/>
        <table:table-column table:style-name="co5" table:default-cell-style-name="ce5"/>
        <table:table-column table:style-name="co6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_</text:p>
          </table:table-cell>
          <table:table-cell office:value-type="string" calcext:value-type="string">
            <text:p>min_</text:p>
          </table:table-cell>
          <table:table-cell office:value-type="string" calcext:value-type="string">
            <text:p>max_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s_log</text:p>
          </table:table-cell>
          <table:table-cell table:style-name="Default" office:value-type="string" calcext:value-type="string">
            <text:p>connector_name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ag_1</text:p>
          </table:table-cell>
          <table:table-cell office:value-type="string" calcext:value-type="string">
            <text:p>float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2</text:p>
          </table:table-cell>
          <table:table-cell office:value-type="string" calcext:value-type="string">
            <text:p>float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3</text:p>
          </table:table-cell>
          <table:table-cell office:value-type="string" calcext:value-type="string">
            <text:p>float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4</text:p>
          </table:table-cell>
          <table:table-cell office:value-type="string" calcext:value-type="string">
            <text:p>float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2">
          <table:table-cell office:value-type="string" calcext:value-type="string">
            <text:p>Tag_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2">
          <table:table-cell office:value-type="string" calcext:value-type="string">
            <text:p>Tag_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table:style-name="ce6" office:value-type="string" calcext:value-type="string">
            <text:p>RI:3:1</text:p>
          </table:table-cell>
          <table:table-cell/>
        </table:table-row>
        <table:table-row table:style-name="ro2">
          <table:table-cell office:value-type="string" calcext:value-type="string">
            <text:p>Tag_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1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1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1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2">
          <table:table-cell office:value-type="string" calcext:value-type="string">
            <text:p>Tag_1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2">
          <table:table-cell office:value-type="string" calcext:value-type="string">
            <text:p>Tag_1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table:style-name="ce6" office:value-type="string" calcext:value-type="string">
            <text:p>RH:3:1</text:p>
          </table:table-cell>
          <table:table-cell/>
        </table:table-row>
        <table:table-row table:style-name="ro2">
          <table:table-cell office:value-type="string" calcext:value-type="string">
            <text:p>Tag_1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office:value-type="string" calcext:value-type="string">
            <text:p>Tag_1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5:1</text:p>
          </table:table-cell>
          <table:table-cell/>
        </table:table-row>
        <table:table-row table:style-name="ro1">
          <table:table-cell office:value-type="string" calcext:value-type="string">
            <text:p>Tag_1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1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2">
          <table:table-cell office:value-type="string" calcext:value-type="string">
            <text:p>Tag_1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2">
          <table:table-cell office:value-type="string" calcext:value-type="string">
            <text:p>Tag_2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table:style-name="ce6" office:value-type="string" calcext:value-type="string">
            <text:p>RI:3:1</text:p>
          </table:table-cell>
          <table:table-cell/>
        </table:table-row>
        <table:table-row table:style-name="ro2">
          <table:table-cell office:value-type="string" calcext:value-type="string">
            <text:p>Tag_2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2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2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2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2">
          <table:table-cell office:value-type="string" calcext:value-type="string">
            <text:p>Tag_2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2">
          <table:table-cell office:value-type="string" calcext:value-type="string">
            <text:p>Tag_2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table:style-name="ce6" office:value-type="string" calcext:value-type="string">
            <text:p>RH:3:1</text:p>
          </table:table-cell>
          <table:table-cell/>
        </table:table-row>
        <table:table-row table:style-name="ro2">
          <table:table-cell office:value-type="string" calcext:value-type="string">
            <text:p>Tag_2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office:value-type="string" calcext:value-type="string">
            <text:p>Tag_2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5:1</text:p>
          </table:table-cell>
          <table:table-cell/>
        </table:table-row>
        <table:table-row table:style-name="ro1">
          <table:table-cell office:value-type="string" calcext:value-type="string">
            <text:p>Tag_2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3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1">
          <table:table-cell office:value-type="string" calcext:value-type="string">
            <text:p>Tag_3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1">
          <table:table-cell office:value-type="string" calcext:value-type="string">
            <text:p>Tag_3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table:style-name="ce6" office:value-type="string" calcext:value-type="string">
            <text:p>RI:3:1</text:p>
          </table:table-cell>
          <table:table-cell/>
        </table:table-row>
        <table:table-row table:style-name="ro1">
          <table:table-cell office:value-type="string" calcext:value-type="string">
            <text:p>Tag_3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3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3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3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1">
          <table:table-cell office:value-type="string" calcext:value-type="string">
            <text:p>Tag_3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1">
          <table:table-cell office:value-type="string" calcext:value-type="string">
            <text:p>Tag_3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table:style-name="ce6" office:value-type="string" calcext:value-type="string">
            <text:p>RH:3:1</text:p>
          </table:table-cell>
          <table:table-cell/>
        </table:table-row>
        <table:table-row table:style-name="ro1">
          <table:table-cell office:value-type="string" calcext:value-type="string">
            <text:p>Tag_3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office:value-type="string" calcext:value-type="string">
            <text:p>Tag_4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5:1</text:p>
          </table:table-cell>
          <table:table-cell/>
        </table:table-row>
        <table:table-row table:style-name="ro1">
          <table:table-cell office:value-type="string" calcext:value-type="string">
            <text:p>Tag_4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4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2">
          <table:table-cell office:value-type="string" calcext:value-type="string">
            <text:p>Tag_4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2">
          <table:table-cell office:value-type="string" calcext:value-type="string">
            <text:p>Tag_4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table:style-name="ce6" office:value-type="string" calcext:value-type="string">
            <text:p>RI:3:1</text:p>
          </table:table-cell>
          <table:table-cell/>
        </table:table-row>
        <table:table-row table:style-name="ro2">
          <table:table-cell office:value-type="string" calcext:value-type="string">
            <text:p>Tag_4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4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4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4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2">
          <table:table-cell office:value-type="string" calcext:value-type="string">
            <text:p>Tag_4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2">
          <table:table-cell office:value-type="string" calcext:value-type="string">
            <text:p>Tag_5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table:style-name="ce6" office:value-type="string" calcext:value-type="string">
            <text:p>RH:3:1</text:p>
          </table:table-cell>
          <table:table-cell/>
        </table:table-row>
        <table:table-row table:style-name="ro2">
          <table:table-cell office:value-type="string" calcext:value-type="string">
            <text:p>Tag_5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office:value-type="string" calcext:value-type="string">
            <text:p>Tag_5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5:1</text:p>
          </table:table-cell>
          <table:table-cell/>
        </table:table-row>
        <table:table-row table:style-name="ro1">
          <table:table-cell office:value-type="string" calcext:value-type="string">
            <text:p>Tag_5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5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2">
          <table:table-cell office:value-type="string" calcext:value-type="string">
            <text:p>Tag_5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2">
          <table:table-cell office:value-type="string" calcext:value-type="string">
            <text:p>Tag_5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table:style-name="ce6" office:value-type="string" calcext:value-type="string">
            <text:p>RI:3:1</text:p>
          </table:table-cell>
          <table:table-cell/>
        </table:table-row>
        <table:table-row table:style-name="ro2">
          <table:table-cell office:value-type="string" calcext:value-type="string">
            <text:p>Tag_5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5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5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6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2">
          <table:table-cell office:value-type="string" calcext:value-type="string">
            <text:p>Tag_6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2">
          <table:table-cell office:value-type="string" calcext:value-type="string">
            <text:p>Tag_6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table:style-name="ce6" office:value-type="string" calcext:value-type="string">
            <text:p>RH:3:1</text:p>
          </table:table-cell>
          <table:table-cell/>
        </table:table-row>
        <table:table-row table:style-name="ro2">
          <table:table-cell office:value-type="string" calcext:value-type="string">
            <text:p>Tag_6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office:value-type="string" calcext:value-type="string">
            <text:p>Tag_6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5:1</text:p>
          </table:table-cell>
          <table:table-cell/>
        </table:table-row>
        <table:table-row table:style-name="ro1">
          <table:table-cell office:value-type="string" calcext:value-type="string">
            <text:p>Tag_6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6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2">
          <table:table-cell office:value-type="string" calcext:value-type="string">
            <text:p>Tag_6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2">
          <table:table-cell office:value-type="string" calcext:value-type="string">
            <text:p>Tag_6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table:style-name="ce6" office:value-type="string" calcext:value-type="string">
            <text:p>RI:3:1</text:p>
          </table:table-cell>
          <table:table-cell/>
        </table:table-row>
        <table:table-row table:style-name="ro2">
          <table:table-cell office:value-type="string" calcext:value-type="string">
            <text:p>Tag_6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7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7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7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2">
          <table:table-cell office:value-type="string" calcext:value-type="string">
            <text:p>Tag_7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2">
          <table:table-cell office:value-type="string" calcext:value-type="string">
            <text:p>Tag_7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table:style-name="ce6" office:value-type="string" calcext:value-type="string">
            <text:p>RH:3:1</text:p>
          </table:table-cell>
          <table:table-cell/>
        </table:table-row>
        <table:table-row table:style-name="ro2">
          <table:table-cell office:value-type="string" calcext:value-type="string">
            <text:p>Tag_7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office:value-type="string" calcext:value-type="string">
            <text:p>Tag_7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5:1</text:p>
          </table:table-cell>
          <table:table-cell/>
        </table:table-row>
        <table:table-row table:style-name="ro1">
          <table:table-cell office:value-type="string" calcext:value-type="string">
            <text:p>Tag_7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7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2">
          <table:table-cell office:value-type="string" calcext:value-type="string">
            <text:p>Tag_7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2">
          <table:table-cell office:value-type="string" calcext:value-type="string">
            <text:p>Tag_8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table:style-name="ce6" office:value-type="string" calcext:value-type="string">
            <text:p>RI:3:1</text:p>
          </table:table-cell>
          <table:table-cell/>
        </table:table-row>
        <table:table-row table:style-name="ro2">
          <table:table-cell office:value-type="string" calcext:value-type="string">
            <text:p>Tag_8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8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8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8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2">
          <table:table-cell office:value-type="string" calcext:value-type="string">
            <text:p>Tag_8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2">
          <table:table-cell office:value-type="string" calcext:value-type="string">
            <text:p>Tag_8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table:style-name="ce6" office:value-type="string" calcext:value-type="string">
            <text:p>RH:3:1</text:p>
          </table:table-cell>
          <table:table-cell/>
        </table:table-row>
        <table:table-row table:style-name="ro2">
          <table:table-cell office:value-type="string" calcext:value-type="string">
            <text:p>Tag_8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office:value-type="string" calcext:value-type="string">
            <text:p>Tag_8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5:1</text:p>
          </table:table-cell>
          <table:table-cell/>
        </table:table-row>
        <table:table-row table:style-name="ro1">
          <table:table-cell office:value-type="string" calcext:value-type="string">
            <text:p>Tag_8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9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2">
          <table:table-cell office:value-type="string" calcext:value-type="string">
            <text:p>Tag_9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2">
          <table:table-cell office:value-type="string" calcext:value-type="string">
            <text:p>Tag_9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table:style-name="ce6" office:value-type="string" calcext:value-type="string">
            <text:p>RI:3:1</text:p>
          </table:table-cell>
          <table:table-cell/>
        </table:table-row>
        <table:table-row table:style-name="ro2">
          <table:table-cell office:value-type="string" calcext:value-type="string">
            <text:p>Tag_9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9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9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9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1">
          <table:table-cell office:value-type="string" calcext:value-type="string">
            <text:p>Tag_9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1">
          <table:table-cell office:value-type="string" calcext:value-type="string">
            <text:p>Tag_9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table:style-name="ce6" office:value-type="string" calcext:value-type="string">
            <text:p>RH:3:1</text:p>
          </table:table-cell>
          <table:table-cell/>
        </table:table-row>
        <table:table-row table:style-name="ro2">
          <table:table-cell office:value-type="string" calcext:value-type="string">
            <text:p>Tag_9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1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_4</text:p>
          </table:table-cell>
          <table:table-cell table:style-name="ce7" office:value-type="string" calcext:value-type="string">
            <text:p>DI:0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2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_4</text:p>
          </table:table-cell>
          <table:table-cell table:style-name="ce15" office:value-type="string" calcext:value-type="string">
            <text:p>DI:1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3</text:p>
          </table:table-cell>
          <table:table-cell table:style-name="Default" office:value-type="string" calcext:value-type="string">
            <text:p>i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_4</text:p>
          </table:table-cell>
          <table:table-cell table:style-name="ce15" office:value-type="string" calcext:value-type="string">
            <text:p>DI:3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4</text:p>
          </table:table-cell>
          <table:table-cell table:style-name="Default" office:value-type="string" calcext:value-type="string">
            <text:p>i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_4</text:p>
          </table:table-cell>
          <table:table-cell table:style-name="ce15" office:value-type="string" calcext:value-type="string">
            <text:p>DI:4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5</text:p>
          </table:table-cell>
          <table:table-cell table:style-name="Default" office:value-type="string" calcext:value-type="string">
            <text:p>i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_4</text:p>
          </table:table-cell>
          <table:table-cell table:style-name="ce15" office:value-type="string" calcext:value-type="string">
            <text:p>DI:5:1</text:p>
          </table:table-cell>
          <table:table-cell/>
        </table:table-row>
      </table:table>
      <table:table table:name="Scripts" table:style-name="ta1">
        <table:table-column table:style-name="co1" table:default-cell-style-name="ce10"/>
        <table:table-column table:style-name="co7" table:default-cell-style-name="ce11"/>
        <table:table-column table:style-name="co8" table:default-cell-style-name="ce11"/>
        <table:table-column table:style-name="co9" table:default-cell-style-name="ce12"/>
        <table:table-column table:style-name="co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is_active</text:p>
          </table:table-cell>
          <table:table-cell table:style-name="Default" office:value-type="string" calcext:value-type="string">
            <text:p>script</text:p>
          </table:table-cell>
          <table:table-cell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1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1')</text:p>
            <text:p>tgv.value = rnd.uniform(0,100)</text:p>
            <text:p>tgv.status = 0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4">
          <table:table-cell office:value-type="string" calcext:value-type="string">
            <text:p>2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<text:span text:style-name="T1">tgv = self.server.get('Tag_2</text:span>')</text:p>
            <text:p>tgv.value = rnd.random()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4">
          <table:table-cell office:value-type="string" calcext:value-type="string">
            <text:p>3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<text:span text:style-name="T1">tgv = self.server.get('Tag_3</text:span>')</text:p>
            <text:p>tgv.value = rnd.random()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4">
          <table:table-cell office:value-type="string" calcext:value-type="string">
            <text:p>4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4')</text:p>
            <text:p>tgv.value = rnd.random()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9">00.00.0000</text:date>, <text:time style:data-style-name="N2" text:time-value="12:58:05.7697374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5-14T11:36:01.514000000</meta:creation-date>
    <meta:generator>LibreOffice/26.2.4.2$Windows_X86_64 LibreOffice_project/0229ac93fcf0d7cbc6376066c6f35021cef002dc</meta:generator>
    <dc:date>2026-07-09T12:59:22.104187300</dc:date>
    <meta:editing-duration>PT7H25M10S</meta:editing-duration>
    <meta:editing-cycles>56</meta:editing-cycles>
    <meta:document-statistic meta:table-count="3" meta:cell-count="887" meta:object-count="0"/>
  </office:meta>
</office:document-meta>
</file>