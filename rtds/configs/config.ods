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2.281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ro5" style:family="table-row">
      <style:table-row-properties style:row-height="1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4" table:default-cell-style-name="ce2"/>
        <table:table-column table:style-name="co1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  <table:table-cell/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2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5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рпол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.00.0000</text:date>, <text:time style:data-style-name="N2" text:time-value="19:16:59.233078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3.2$Windows_X86_64 LibreOffice_project/70e089b17412e4cb7773e41413306b17a2328c34</meta:generator>
    <dc:date>2026-06-13T19:34:50.569325800</dc:date>
    <meta:editing-duration>PT6H42M28S</meta:editing-duration>
    <meta:editing-cycles>42</meta:editing-cycles>
    <meta:document-statistic meta:table-count="3" meta:cell-count="793" meta:object-count="0"/>
  </office:meta>
</office:document-meta>
</file>